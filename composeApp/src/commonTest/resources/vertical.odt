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1A0000007D64C8A5C5.png" manifest:media-type="image/png"/>
  <manifest:file-entry manifest:full-path="Pictures/100000010000031A0000007DA7452DA3.png" manifest:media-type="image/png"/>
  <manifest:file-entry manifest:full-path="Pictures/100000010000031A0000007DC0878FFF.png" manifest:media-type="image/png"/>
  <manifest:file-entry manifest:full-path="Pictures/100000010000031A0000007D92C4044F.png" manifest:media-type="image/png"/>
  <manifest:file-entry manifest:full-path="Pictures/100000010000031A0000007D17E69BBF.png" manifest:media-type="image/png"/>
  <manifest:file-entry manifest:full-path="Pictures/100000010000031A0000007D9270B152.png" manifest:media-type="image/png"/>
  <manifest:file-entry manifest:full-path="Pictures/100000010000031A0000007D03FE1E99.png" manifest:media-type="image/png"/>
  <manifest:file-entry manifest:full-path="Pictures/100000010000031A0000007D9537D323.png" manifest:media-type="image/png"/>
  <manifest:file-entry manifest:full-path="Pictures/100000010000031A0000007D6C58AA3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图像1" text:anchor-type="char" svg:x="-0.776cm" svg:y="0cm" svg:width="21.001cm" svg:height="3.306cm" draw:z-index="0"><draw:image xlink:href="Pictures/100000010000031A0000007D64C8A5C5.png" xlink:type="simple" xlink:show="embed" xlink:actuate="onLoad" draw:mime-type="image/png"/></draw:frame><draw:frame draw:style-name="fr2" draw:name="图像2" text:anchor-type="char" svg:x="0cm" svg:y="3.304cm" svg:width="21.001cm" svg:height="3.306cm" draw:z-index="1"><draw:image xlink:href="Pictures/100000010000031A0000007D17E69BBF.png" xlink:type="simple" xlink:show="embed" xlink:actuate="onLoad" draw:mime-type="image/png"/></draw:frame><draw:frame draw:style-name="fr2" draw:name="图像3" text:anchor-type="char" svg:x="0cm" svg:y="6.608cm" svg:width="21.001cm" svg:height="3.306cm" draw:z-index="2"><draw:image xlink:href="Pictures/100000010000031A0000007DA7452DA3.png" xlink:type="simple" xlink:show="embed" xlink:actuate="onLoad" draw:mime-type="image/png"/></draw:frame><draw:frame draw:style-name="fr2" draw:name="图像4" text:anchor-type="char" svg:x="0cm" svg:y="9.911cm" svg:width="21.001cm" svg:height="3.306cm" draw:z-index="3"><draw:image xlink:href="Pictures/100000010000031A0000007D9270B152.png" xlink:type="simple" xlink:show="embed" xlink:actuate="onLoad" draw:mime-type="image/png"/></draw:frame><draw:frame draw:style-name="fr2" draw:name="图像5" text:anchor-type="char" svg:x="0cm" svg:y="13.215cm" svg:width="21.001cm" svg:height="3.306cm" draw:z-index="4"><draw:image xlink:href="Pictures/100000010000031A0000007D03FE1E99.png" xlink:type="simple" xlink:show="embed" xlink:actuate="onLoad" draw:mime-type="image/png"/></draw:frame><draw:frame draw:style-name="fr2" draw:name="图像6" text:anchor-type="char" svg:x="0cm" svg:y="16.519cm" svg:width="21.001cm" svg:height="3.306cm" draw:z-index="5"><draw:image xlink:href="Pictures/100000010000031A0000007D9537D323.png" xlink:type="simple" xlink:show="embed" xlink:actuate="onLoad" draw:mime-type="image/png"/></draw:frame><draw:frame draw:style-name="fr2" draw:name="图像7" text:anchor-type="char" svg:x="0cm" svg:y="19.823cm" svg:width="21.001cm" svg:height="3.306cm" draw:z-index="6"><draw:image xlink:href="Pictures/100000010000031A0000007D92C4044F.png" xlink:type="simple" xlink:show="embed" xlink:actuate="onLoad" draw:mime-type="image/png"/></draw:frame><draw:frame draw:style-name="fr2" draw:name="图像8" text:anchor-type="char" svg:x="0cm" svg:y="23.126cm" svg:width="21.001cm" svg:height="3.306cm" draw:z-index="7"><draw:image xlink:href="Pictures/100000010000031A0000007DC0878FFF.png" xlink:type="simple" xlink:show="embed" xlink:actuate="onLoad" draw:mime-type="image/png"/></draw:frame><draw:frame draw:style-name="fr2" draw:name="图像9" text:anchor-type="char" svg:x="0cm" svg:y="26.395cm" svg:width="21.001cm" svg:height="3.306cm" draw:z-index="8"><draw:image xlink:href="Pictures/100000010000031A0000007D6C58AA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9T14:49:37.429498600</meta:creation-date>
    <dc:date>2026-05-19T14:54:50.239721900</dc:date>
    <meta:editing-duration>PT5M13S</meta:editing-duration>
    <meta:editing-cycles>2</meta:editing-cycles>
    <meta:generator>LibreOffice/26.2.3.2$Windows_X86_64 LibreOffice_project/70e089b17412e4cb7773e41413306b17a2328c34</meta:generator>
    <meta:document-statistic meta:table-count="0" meta:image-count="9" meta:object-count="0" meta:page-count="1" meta:paragraph-count="0" meta:word-count="0" meta:character-count="0" meta:non-whitespace-character-count="0"/>
  </office:meta>
</office:document-meta>
</file>